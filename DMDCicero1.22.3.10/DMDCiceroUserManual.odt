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87b5" officeooo:paragraph-rsid="001087b5"/>
    </style:style>
    <style:style style:name="P2" style:family="paragraph" style:parent-style-name="Text_20_body">
      <style:paragraph-properties fo:text-align="justify" style:justify-single-word="false"/>
      <style:text-properties officeooo:paragraph-rsid="001e1c94"/>
    </style:style>
    <style:style style:name="P3" style:family="paragraph" style:parent-style-name="Text_20_body">
      <style:paragraph-properties fo:text-align="justify" style:justify-single-word="false"/>
      <style:text-properties officeooo:paragraph-rsid="001ed3cf"/>
    </style:style>
    <style:style style:name="P4" style:family="paragraph" style:parent-style-name="Text_20_body">
      <style:paragraph-properties fo:text-align="justify" style:justify-single-word="false"/>
      <style:text-properties officeooo:rsid="001ed3cf" officeooo:paragraph-rsid="001ed3cf"/>
    </style:style>
    <style:style style:name="P5" style:family="paragraph" style:parent-style-name="Title">
      <style:text-properties officeooo:rsid="001087b5" officeooo:paragraph-rsid="001087b5"/>
    </style:style>
    <style:style style:name="P6" style:family="paragraph" style:parent-style-name="Heading_20_1">
      <style:text-properties officeooo:rsid="001087b5" officeooo:paragraph-rsid="001087b5"/>
    </style:style>
    <style:style style:name="P7" style:family="paragraph" style:parent-style-name="Text_20_body" style:list-style-name="L1">
      <style:paragraph-properties fo:text-align="justify" style:justify-single-word="false"/>
      <style:text-properties officeooo:rsid="001f85cd" officeooo:paragraph-rsid="001f85cd"/>
    </style:style>
    <style:style style:name="P8" style:family="paragraph" style:parent-style-name="Text_20_body">
      <style:paragraph-properties fo:text-align="justify" style:justify-single-word="false"/>
      <style:text-properties officeooo:rsid="00207f67" officeooo:paragraph-rsid="00207f67"/>
    </style:style>
    <style:style style:name="P9" style:family="paragraph" style:parent-style-name="Text_20_body">
      <style:text-properties officeooo:rsid="0021bb1f" officeooo:paragraph-rsid="0021bb1f"/>
    </style:style>
    <style:style style:name="P10" style:family="paragraph" style:parent-style-name="Text_20_body">
      <style:paragraph-properties fo:text-align="justify" style:justify-single-word="false"/>
      <style:text-properties officeooo:rsid="0021bb1f" officeooo:paragraph-rsid="0021bb1f"/>
    </style:style>
    <style:style style:name="P11" style:family="paragraph" style:parent-style-name="Text_20_body" style:list-style-name="L2">
      <style:paragraph-properties fo:text-align="justify" style:justify-single-word="false"/>
      <style:text-properties officeooo:rsid="0021bb1f" officeooo:paragraph-rsid="0021bb1f"/>
    </style:style>
    <style:style style:name="P12" style:family="paragraph" style:parent-style-name="Text_20_body" style:list-style-name="L2">
      <style:paragraph-properties fo:text-align="justify" style:justify-single-word="false"/>
      <style:text-properties officeooo:rsid="00221e59" officeooo:paragraph-rsid="00221e5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f85cd"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officeooo:rsid="00221e59"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1b0ed2" style:font-weight-asian="normal" style:font-weight-complex="normal"/>
    </style:style>
    <style:style style:name="T7" style:family="text">
      <style:text-properties fo:font-weight="normal" officeooo:rsid="001f85cd" style:font-weight-asian="normal" style:font-weight-complex="normal"/>
    </style:style>
    <style:style style:name="T8" style:family="text">
      <style:text-properties officeooo:rsid="001e1c94"/>
    </style:style>
    <style:style style:name="T9" style:family="text">
      <style:text-properties style:font-name="Liberation Serif"/>
    </style:style>
    <style:style style:name="T10" style:family="text">
      <style:text-properties style:font-name="Liberation Serif" officeooo:rsid="001e1c94"/>
    </style:style>
    <style:style style:name="T11" style:family="text">
      <style:text-properties style:font-name="Liberation Serif" officeooo:rsid="001ed3cf"/>
    </style:style>
    <style:style style:name="T12" style:family="text">
      <style:text-properties style:font-name="Liberation Serif" officeooo:rsid="00207f67"/>
    </style:style>
    <style:style style:name="T13" style:family="text">
      <style:text-properties officeooo:rsid="001ed3cf"/>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221e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8">DMDCicero</text:span> User Guide</text:p>
      <text:p text:style-name="P1"/>
      <text:h text:style-name="P6" text:outline-level="1">General notes</text:h>
      <text:p text:style-name="P2"><text:span text:style-name="T8">Cicero, written by Aviv Keshet and freely distributed under the GNU </text:span><text:span text:style-name="Source_20_Text"><text:span text:style-name="T9">General Public License as published by the Free Software Foundation </text:span></text:span><text:span text:style-name="Source_20_Text"><text:span text:style-name="T10">and </text:span></text:span><text:span text:style-name="T8">designed to act as a user interface or a ”client” for Atticus, which takes care of controlling the National Intruments output hardware. </text:span><text:span text:style-name="Source_20_Text"><text:span text:style-name="T10">DMDCicero is a slightly altered version of Cicero, designed to add a simple communications channel between the Cicero client and Morse (from version 1.20.7 onwards), a client software for controlling ALP 4.2 -based digital micromirror devices (DMDs) manufactured by Vialux.</text:span></text:span></text:p>
      <text:p text:style-name="P3"><text:span text:style-name="Source_20_Text"><text:span text:style-name="T10">This document will describe features unique to DMDCicero. </text:span></text:span><text:span text:style-name="Source_20_Text"><text:span text:style-name="T12">F</text:span></text:span><text:span text:style-name="Source_20_Text"><text:span text:style-name="T10">or instructions on how to use Cicero, see </text:span></text:span><text:span text:style-name="Source_20_Text"><text:span text:style-name="T11">the Github page </text:span></text:span><text:a xlink:type="simple" xlink:href="https://github.com/akeshet/Cicero-Word-Generator" text:style-name="Internet_20_link" text:visited-style-name="Visited_20_Internet_20_Link"><text:span text:style-name="Source_20_Text"><text:span text:style-name="T11">https://github.com/akeshet/Cicero-Word-Generator</text:span></text:span></text:a><text:span text:style-name="Source_20_Text"><text:span text:style-name="T11"> .</text:span></text:span></text:p>
      <text:h text:style-name="P6" text:outline-level="1">Using <text:span text:style-name="T13">DMDCicero</text:span></text:h>
      <text:p text:style-name="P4"><text:span text:style-name="T6">D</text:span><text:span text:style-name="T5">MDCicero works exactly like Cicero, except for an extra feature allowing for simple communication between DMDCicero and Morse. The communication between DMDCicero and Morse is handled through the text file </text:span><text:span text:style-name="T1">\\storage.yale.edu\home\navon-627019-FASPHY\Li Lab\DMD\Runtime\DMDruntime.txt</text:span><text:span text:style-name="T5">.The first row of the text file tells Morse whether to reload all uploaded sequences to the queue of the DMD, and the second row changes their refresh rate.</text:span></text:p>
      <text:p text:style-name="P4"><text:span text:style-name="T5">Controlling Morse via DMDCicero takes place via the </text:span><text:span text:style-name="T1">Variables</text:span><text:span text:style-name="T5"> tab of the Cicero interface. </text:span><text:span text:style-name="T7">Each time a sequence is run, DMDCicero will look for two variables: </text:span><text:span text:style-name="T2">DMDfreq</text:span><text:span text:style-name="T7"> and </text:span><text:span text:style-name="T2">DMDupdt</text:span><text:span text:style-name="T7">. If variables with these names are found on the variable list, DMDCicero will notify the user via the runtime window textbox. The variable values control DMDCicero as follows:</text:span></text:p>
      <text:list xml:id="list153689280" text:style-name="L1">
        <text:list-item>
          <text:p text:style-name="P7"><text:span text:style-name="T1">DMDupdt</text:span><text:span text:style-name="T14">:</text:span><text:span text:style-name="T5"> If the value of this variable is 1, Morse will add all uploaded sequences to its queue in the order they are listed in the sequence list. If this value is anything else, Morse will not add the sequences to the DMD sequence queue.</text:span></text:p>
        </text:list-item>
        <text:list-item>
          <text:p text:style-name="P7"><text:span text:style-name="T1">DMDfreq</text:span><text:span text:style-name="T5">: If </text:span><text:span text:style-name="T1">DMDupdt </text:span><text:span text:style-name="T14">equals 1, Cicero will update the refresh rate of the uploaded sequences while adding them to the queue. The updated refresh rate corresponds to the value of </text:span><text:span text:style-name="T1">DMDfreq</text:span><text:span text:style-name="T14"> in Hz. Valid range: 0.1-22,727 Hz.</text:span></text:p>
        </text:list-item>
      </text:list>
      <text:p text:style-name="P8"><text:span text:style-name="T14">Additionally, DMDCicero saves the runlogs to the shared drive, under </text:span><text:span text:style-name="T1">\\storage.yale.edu\home\navon-627019-FASPHY\Li Lab\DMDCicero Runlogs\YYYY\MM\DD\</text:span></text:p>
      <text:p text:style-name="P8"><text:span text:style-name="T1"/></text:p>
      <text:h text:style-name="Heading_20_1" text:outline-level="1"><text:soft-page-break/></text:h>
      <text:h text:style-name="Heading_20_1" text:outline-level="1">Changes in v.1.20.7.9</text:h>
      <text:p text:style-name="P10">The main change was the added functionality to run serial port devices (<text:span text:style-name="T3">Baud</text:span>=115200, <text:span text:style-name="T3">StopBits</text:span>=1, <text:span text:style-name="T3">DataBits</text:span>=8 – this was tested on SRS SG384 signal generator) connected to Cicero computer via the RS232 tab. This feature supports raw data commands (text only) + parameter commands (text+numeric variable). The current version supports two simultaneously connected RS232 devices.</text:p>
      <text:p text:style-name="P10">To set up the devices, one needs to:</text:p>
      <text:list xml:id="list2418465972" text:style-name="L2">
        <text:list-item>
          <text:p text:style-name="P11">Create one or two dummy RS232 devices (these should show as <text:span text:style-name="T3">unassigned</text:span> in the channel manager) with logical index 0 (for the first device - Dev1) and 1 (for the second device - Dev2).</text:p>
        </text:list-item>
        <text:list-item>
          <text:p text:style-name="P11">These devices are assumed to be attached to ports COM3 (Dev1) and COM4 (Dev2) on the Cicero computer, but these ports can be changed via the variable tab by creating variables named <text:span text:style-name="T3">R</text:span><text:span text:style-name="T4">S</text:span><text:span text:style-name="T3">port1</text:span> (Dev1) and <text:span text:style-name="T3">R</text:span><text:span text:style-name="T4">S</text:span><text:span text:style-name="T3">port2</text:span> (Dev2), <text:span text:style-name="T15">whose values control the COM port number.</text:span></text:p>
        </text:list-item>
        <text:list-item>
          <text:p text:style-name="P12">Once the devices are properly set up, one can assign command during a sequence via assigning the wanted RS232 groups into the sequence. Cicero will try to output the commands in the beginning of the timestep the commands are assigned to.</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5:35:16.084000000</meta:creation-date>
    <dc:date>2020-07-09T23:02:34.262000000</dc:date>
    <meta:editing-duration>PT28M25S</meta:editing-duration>
    <meta:editing-cycles>8</meta:editing-cycles>
    <meta:generator>LibreOffice/5.3.4.2$Windows_X86_64 LibreOffice_project/f82d347ccc0be322489bf7da61d7e4ad13fe2ff3</meta:generator>
    <meta:document-statistic meta:table-count="0" meta:image-count="0" meta:object-count="0" meta:page-count="2" meta:paragraph-count="16" meta:word-count="512" meta:character-count="3282" meta:non-whitespace-character-count="2790"/>
  </office:meta>
</office:document-meta>
</file>